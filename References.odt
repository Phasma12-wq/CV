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f907" officeooo:paragraph-rsid="0015f907"/>
    </style:style>
    <style:style style:name="P2" style:family="paragraph" style:parent-style-name="Standard" style:list-style-name="L1">
      <style:text-properties officeooo:rsid="0015f907" officeooo:paragraph-rsid="0015f907"/>
    </style:style>
    <style:style style:name="P3" style:family="paragraph" style:parent-style-name="Standard" style:list-style-name="L1">
      <style:text-properties officeooo:rsid="00167323" officeooo:paragraph-rsid="00167323"/>
    </style:style>
    <style:style style:name="P4" style:family="paragraph" style:parent-style-name="Standard" style:list-style-name="L1">
      <loext:graphic-properties draw:fill="none" draw:fill-color="#ffffff"/>
      <style:paragraph-properties fo:background-color="transparent"/>
      <style:text-properties officeooo:rsid="00167323" officeooo:paragraph-rsid="0018473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80" loext:opacity="100%" style:text-underline-style="solid" style:text-underline-width="auto" style:text-underline-color="font-color" officeooo:rsid="0018473d" fo:background-color="transparent" loext:char-shading-value="0"/>
    </style:style>
    <style:style style:name="T3" style:family="text">
      <style:text-properties fo:color="#000000" loext:opacity="100%" style:text-underline-style="none" officeooo:rsid="0018473d" fo:background-color="transparent" loext:char-shading-value="0"/>
    </style:style>
    <style:style style:name="T4" style:family="text">
      <style:text-properties style:text-underline-style="none" officeooo:rsid="0018473d"/>
    </style:style>
    <style:style style:name="T5" style:family="text">
      <style:text-properties officeooo:rsid="0018473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ferences</text:span></text:p>
      <text:list text:style-name="L1">
        <text:list-item>
          <text:p text:style-name="P2">Alish Narine: <text:a xlink:type="simple" xlink:href="mailto:Narine.a@belgiumcampus.ac.za" text:style-name="Internet_20_link" text:visited-style-name="Visited_20_Internet_20_Link">Narine.a@belgiumcampus.ac.za</text:a></text:p>
        </text:list-item>
        <text:list-item>
          <text:p text:style-name="P3">Christiaan Els.: <text:a xlink:type="simple" xlink:href="mailto:els.c@belgiumcampus.ac.za" text:style-name="Internet_20_link" text:visited-style-name="Visited_20_Internet_20_Link">els.c@belgiumcampus.ac.za</text:a></text:p>
        </text:list-item>
        <text:list-item>
          <text:p text:style-name="P4"><text:a xlink:type="simple" xlink:href="mailto:Kelil.a@belgiumcampus.ac.za" text:style-name="Internet_20_link" text:visited-style-name="Visited_20_Internet_20_Link"><text:span text:style-name="T2">S</text:span></text:a><text:span text:style-name="T3">im</text:span><text:span text:style-name="T4">ba </text:span><text:span text:style-name="T5">Zengeni: </text:span><text:a xlink:type="simple" xlink:href="mailto:zengeni.s@belgiumcampus.ac.za" text:style-name="Internet_20_link" text:visited-style-name="Visited_20_Internet_20_Link"><text:span text:style-name="T5">zengeni.s@belgiumcampus.ac.za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13:12:46.988543887</meta:creation-date>
    <dc:date>2026-05-20T13:18:15.130638230</dc:date>
    <meta:editing-duration>PT5M25S</meta:editing-duration>
    <meta:editing-cycles>7</meta:editing-cycles>
    <meta:generator>LibreOffice/26.2.3.2$Linux_X86_64 LibreOffice_project/ca14918b0fa569b9db704e10d20c5d2a5a16ac6d</meta:generator>
    <meta:document-statistic meta:table-count="0" meta:image-count="0" meta:object-count="0" meta:page-count="1" meta:paragraph-count="4" meta:word-count="13" meta:character-count="141" meta:non-whitespace-character-count="135"/>
  </office:meta>
</office:document-meta>
</file>